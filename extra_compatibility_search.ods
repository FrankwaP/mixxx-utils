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1.688cm"/>
    </style:style>
    <style:style style:name="ro1" style:family="table-row">
      <style:table-row-properties style:row-height="5.6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9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30"/>
    <style:style style:name="ce11" style:family="table-cell" style:parent-style-name="Default" style:data-style-name="N0">
      <style:table-cell-properties fo:background-color="#00a933"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7" office:value-type="string" calcext:value-type="string">
            <text:p>The purpose of this notebook is to generate a search expression to retrieve extra compatible tracks, </text:p>
            <text:p>Which are the ones whose tonalities are compatible once adjusted to the BPM of the master track.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master track</text:p>
          </table:table-cell>
          <table:table-cell table:number-columns-repeated="2"/>
          <table:table-cell office:value-type="string" calcext:value-type="string">
            <text:p>accuracy of tonality</text:p>
          </table:table-cell>
          <table:table-cell table:number-columns-repeated="2"/>
          <table:table-cell office:value-type="string" calcext:value-type="string">
            <text:p>search expressio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table:style-name="ce9" office:value-type="string" calcext:value-type="string">
            <text:p>7A</text:p>
          </table:table-cell>
          <table:table-cell/>
          <table:table-cell office:value-type="string" calcext:value-type="string">
            <text:p>tone range</text:p>
          </table:table-cell>
          <table:table-cell table:style-name="ce11" office:value-type="float" office:value="0.125" calcext:value-type="float">
            <text:p>0,125</text:p>
          </table:table-cell>
          <table:table-cell/>
          <table:table-cell office:value-type="string" calcext:value-type="string">
            <text:p>same</text:p>
          </table:table-cell>
          <table:table-cell table:style-name="ce5" table:formula="of:=[.M21]" office:value-type="string" office:string-value="~key:&quot;7A&quot; bpm:&gt;=134,1 bpm:&lt;=138" calcext:value-type="string">
            <text:p>~key:"7A" bpm:&gt;=134,1 bpm:&lt;=13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m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4"/>
          <table:table-cell office:value-type="string" calcext:value-type="string">
            <text:p>same+slower</text:p>
          </table:table-cell>
          <table:table-cell table:style-name="ce5" table:formula="of:=[.M21]&amp;&quot; OR &quot;&amp;[.M22]" office:value-type="string" office:string-value="~key:&quot;7A&quot; bpm:&gt;=134,1 bpm:&lt;=138 OR ~key:&quot;12A&quot; bpm:&gt;=126,5 bpm:&lt;=130" calcext:value-type="string">
            <text:p>~key:"7A" bpm:&gt;=134,1 bpm:&lt;=138 OR ~key:"12A" bpm:&gt;=126,5 bpm:&lt;=130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same+faster</text:p>
          </table:table-cell>
          <table:table-cell table:style-name="ce6" table:formula="of:=[.M21]&amp;&quot; OR &quot;&amp;[.M23]" office:value-type="string" office:string-value="~key:&quot;7A&quot; bpm:&gt;=134,1 bpm:&lt;=138 OR ~key:&quot;2A&quot; bpm:&gt;=142 bpm:&lt;=146" calcext:value-type="string">
            <text:p>~key:"7A" bpm:&gt;=134,1 bpm:&lt;=138 OR ~key:"2A" bpm:&gt;=142 bpm:&lt;=146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all</text:p>
          </table:table-cell>
          <table:table-cell table:formula="of:=[.M21]&amp;&quot; OR &quot;&amp;[.M22]&amp;&quot; OR &quot;&amp;[.M23]" office:value-type="string" office:string-value="~key:&quot;7A&quot; bpm:&gt;=134,1 bpm:&lt;=138 OR ~key:&quot;12A&quot; bpm:&gt;=126,5 bpm:&lt;=130 OR ~key:&quot;2A&quot; bpm:&gt;=142 bpm:&lt;=146" calcext:value-type="string">
            <text:p>~key:"7A" bpm:&gt;=134,1 bpm:&lt;=138 OR ~key:"12A" bpm:&gt;=126,5 bpm:&lt;=130 OR ~key:"2A" bpm:&gt;=142 bpm:&lt;=146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step by step computati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formula="of:=LEFT([.C5];LEN([.C5])-1)" office:value-type="string" office:string-value="7" calcext:value-type="string">
            <text:p>7</text:p>
          </table:table-cell>
          <table:table-cell table:formula="of:=RIGHT([.C5];1)" office:value-type="string" office:string-value="A" calcext:value-type="string">
            <text:p>A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semitones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emitones bpm ratio</text:p>
          </table:table-cell>
          <table:table-cell table:style-name="ce1" table:formula="of:=10^(LOG(2)/[.E15])" office:value-type="float" office:value="1.0594630943593" calcext:value-type="float">
            <text:p>1,06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1"/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ubtones</text:p>
          </table:table-cell>
          <table:table-cell table:formula="of:=12*(0.5/[.F5])"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ubtones bpm ratio</text:p>
          </table:table-cell>
          <table:table-cell table:style-name="ce1" table:formula="of:=10^(LOG(2)/[.E18])" office:value-type="float" office:value="1.01454533493752" calcext:value-type="float">
            <text:p>1,01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,00</text:p>
          </table:table-cell>
          <table:table-cell table:formula="of:=MOD([.$D$13]-1+[.A21];12)+1" office:value-type="float" office:value="7" calcext:value-type="float">
            <text:p>7</text:p>
          </table:table-cell>
          <table:table-cell table:formula="of:=[.C21]&amp;[.$E$13]" office:value-type="string" office:string-value="7A" calcext:value-type="string">
            <text:p>7A</text:p>
          </table:table-cell>
          <table:table-cell table:style-name="ce4" table:formula="of:=[.$C$6]*[.B21]" office:value-type="float" office:value="136" calcext:value-type="float">
            <text:p>136,0</text:p>
          </table:table-cell>
          <table:table-cell table:style-name="ce4" table:formula="of:=[.E21]/[.$E$19]" office:value-type="float" office:value="134.050195015066" calcext:value-type="float">
            <text:p>134,1</text:p>
          </table:table-cell>
          <table:table-cell table:style-name="ce4" table:formula="of:=[.E21]*[.$E$19]" office:value-type="float" office:value="137.978165551503" calcext:value-type="float">
            <text:p>138,0</text:p>
          </table:table-cell>
          <table:table-cell/>
          <table:table-cell table:formula="of:=&quot;~key:&quot;&quot;&quot;&amp;[.D21]&amp;&quot;&quot;&quot;&quot;" office:value-type="string" office:string-value="~key:&quot;7A&quot;" calcext:value-type="string">
            <text:p>~key:"7A"</text:p>
          </table:table-cell>
          <table:table-cell table:style-name="ce5" table:formula="of:=&quot;bpm:&gt;=&quot;&amp;ROUND([.F21];1)" office:value-type="string" office:string-value="bpm:&gt;=134,1" calcext:value-type="string">
            <text:p>bpm:&gt;=134,1</text:p>
          </table:table-cell>
          <table:table-cell table:style-name="ce5" table:formula="of:=&quot;bpm:&lt;=&quot;&amp;ROUND([.G21])" office:value-type="string" office:string-value="bpm:&lt;=138" calcext:value-type="string">
            <text:p>bpm:&lt;=138</text:p>
          </table:table-cell>
          <table:table-cell/>
          <table:table-cell table:style-name="ce5" table:formula="of:=[.I21]&amp;&quot; &quot;&amp;[.J21]&amp;&quot; &quot;&amp;[.K21]" office:value-type="string" office:string-value="~key:&quot;7A&quot; bpm:&gt;=134,1 bpm:&lt;=138" calcext:value-type="string">
            <text:p>~key:"7A" bpm:&gt;=134,1 bpm:&lt;=138</text:p>
          </table:table-cell>
        </table:table-row>
        <table:table-row table:style-name="ro2">
          <table:table-cell office:value-type="float" office:value="-7" calcext:value-type="float">
            <text:p>-7</text:p>
          </table:table-cell>
          <table:table-cell table:style-name="ce1" table:formula="of:=1/[.E16]" office:value-type="float" office:value="0.943874312681693" calcext:value-type="float">
            <text:p>0,94</text:p>
          </table:table-cell>
          <table:table-cell table:formula="of:=MOD([.$D$13]-1+[.A22];12)+1" office:value-type="float" office:value="12" calcext:value-type="float">
            <text:p>12</text:p>
          </table:table-cell>
          <table:table-cell table:formula="of:=[.C22]&amp;[.$E$13]" office:value-type="string" office:string-value="12A" calcext:value-type="string">
            <text:p>12A</text:p>
          </table:table-cell>
          <table:table-cell table:style-name="ce4" table:formula="of:=[.$C$6]*[.B22]" office:value-type="float" office:value="128.36690652471" calcext:value-type="float">
            <text:p>128,4</text:p>
          </table:table-cell>
          <table:table-cell table:style-name="ce4" table:formula="of:=[.E22]/[.$E$19]" office:value-type="float" office:value="126.526535684692" calcext:value-type="float">
            <text:p>126,5</text:p>
          </table:table-cell>
          <table:table-cell table:style-name="ce4" table:formula="of:=[.E22]*[.$E$19]" office:value-type="float" office:value="130.234046175005" calcext:value-type="float">
            <text:p>130,2</text:p>
          </table:table-cell>
          <table:table-cell/>
          <table:table-cell table:formula="of:=&quot;~key:&quot;&quot;&quot;&amp;[.D22]&amp;&quot;&quot;&quot;&quot;" office:value-type="string" office:string-value="~key:&quot;12A&quot;" calcext:value-type="string">
            <text:p>~key:"12A"</text:p>
          </table:table-cell>
          <table:table-cell table:formula="of:=&quot;bpm:&gt;=&quot;&amp;ROUND([.F22];1)" office:value-type="string" office:string-value="bpm:&gt;=126,5" calcext:value-type="string">
            <text:p>bpm:&gt;=126,5</text:p>
          </table:table-cell>
          <table:table-cell table:style-name="ce5" table:formula="of:=&quot;bpm:&lt;=&quot;&amp;ROUND([.G22])" office:value-type="string" office:string-value="bpm:&lt;=130" calcext:value-type="string">
            <text:p>bpm:&lt;=130</text:p>
          </table:table-cell>
          <table:table-cell/>
          <table:table-cell table:formula="of:=[.I22]&amp;&quot; &quot;&amp;[.J22]&amp;&quot; &quot;&amp;[.K22]" office:value-type="string" office:string-value="~key:&quot;12A&quot; bpm:&gt;=126,5 bpm:&lt;=130" calcext:value-type="string">
            <text:p>~key:"12A" bpm:&gt;=126,5 bpm:&lt;=1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table:formula="of:=[.E16]" office:value-type="float" office:value="1.0594630943593" calcext:value-type="float">
            <text:p>1,06</text:p>
          </table:table-cell>
          <table:table-cell table:formula="of:=MOD([.$D$13]-1+[.A23];12)+1" office:value-type="float" office:value="2" calcext:value-type="float">
            <text:p>2</text:p>
          </table:table-cell>
          <table:table-cell table:formula="of:=[.C23]&amp;[.$E$13]" office:value-type="string" office:string-value="2A" calcext:value-type="string">
            <text:p>2A</text:p>
          </table:table-cell>
          <table:table-cell table:style-name="ce4" table:formula="of:=[.$C$6]*[.B23]" office:value-type="float" office:value="144.086980832865" calcext:value-type="float">
            <text:p>144,1</text:p>
          </table:table-cell>
          <table:table-cell table:style-name="ce4" table:formula="of:=[.E23]/[.$E$19]" office:value-type="float" office:value="142.021234410129" calcext:value-type="float">
            <text:p>142,0</text:p>
          </table:table-cell>
          <table:table-cell table:style-name="ce4" table:formula="of:=[.E23]*[.$E$19]" office:value-type="float" office:value="146.182774229215" calcext:value-type="float">
            <text:p>146,2</text:p>
          </table:table-cell>
          <table:table-cell/>
          <table:table-cell table:formula="of:=&quot;~key:&quot;&quot;&quot;&amp;[.D23]&amp;&quot;&quot;&quot;&quot;" office:value-type="string" office:string-value="~key:&quot;2A&quot;" calcext:value-type="string">
            <text:p>~key:"2A"</text:p>
          </table:table-cell>
          <table:table-cell table:formula="of:=&quot;bpm:&gt;=&quot;&amp;ROUND([.F23];1)" office:value-type="string" office:string-value="bpm:&gt;=142" calcext:value-type="string">
            <text:p>bpm:&gt;=142</text:p>
          </table:table-cell>
          <table:table-cell table:style-name="ce5" table:formula="of:=&quot;bpm:&lt;=&quot;&amp;ROUND([.G23])" office:value-type="string" office:string-value="bpm:&lt;=146" calcext:value-type="string">
            <text:p>bpm:&lt;=146</text:p>
          </table:table-cell>
          <table:table-cell/>
          <table:table-cell table:formula="of:=[.I23]&amp;&quot; &quot;&amp;[.J23]&amp;&quot; &quot;&amp;[.K23]" office:value-type="string" office:string-value="~key:&quot;2A&quot; bpm:&gt;=142 bpm:&lt;=146" calcext:value-type="string">
            <text:p>~key:"2A" bpm:&gt;=142 bpm:&lt;=146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6"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8" number:min-decimal-places="1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8:33:56.480990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02:51.170332570</meta:creation-date>
    <dc:date>2026-02-15T20:52:13.341006925</dc:date>
    <meta:editing-duration>PT2H4M33S</meta:editing-duration>
    <meta:editing-cycles>3</meta:editing-cycles>
    <meta:generator>LibreOffice/24.2.7.2$Linux_X86_64 LibreOffice_project/420$Build-2</meta:generator>
    <meta:document-statistic meta:table-count="1" meta:cell-count="62" meta:object-count="0"/>
  </office:meta>
</office:document-meta>
</file>